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>
            <text:p>items_game entries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Brazilian Miku</text:p>
          </table:table-cell>
          <table:table-cell table:number-columns-repeated="6"/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15T01:31:21.208000000</meta:creation-date>
    <dc:date>2026-07-15T01:36:12.631000000</dc:date>
    <meta:editing-duration>PT4M51S</meta:editing-duration>
    <meta:editing-cycles>2</meta:editing-cycles>
    <meta:generator>LibreOffice/7.6.6.3$Windows_X86_64 LibreOffice_project/d97b2716a9a4a2ce1391dee1765565ea469b0ae7</meta:generator>
    <meta:document-statistic meta:table-count="1" meta:cell-count="6" meta:object-count="0"/>
  </office:meta>
</office:document-meta>
</file>