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items_game entries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RL</text:p>
          </table:table-cell>
          <table:table-cell office:value-type="string" calcext:value-type="string">
            <text:p>Last Updated on Worksho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Brazilian Miku</text:p>
          </table:table-cell>
          <table:table-cell/>
          <table:table-cell table:style-name="ce7" office:value-type="date" office:date-value="2026-07-15" calcext:value-type="date">
            <text:p>07/15/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string" calcext:value-type="string">
            <text:p>Saul Goodman</text:p>
          </table:table-cell>
          <table:table-cell/>
          <table:table-cell table:style-name="ce7" office:value-type="date" office:date-value="2026-07-15" calcext:value-type="date">
            <text:p>07/15/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string" calcext:value-type="string">
            <text:p>Xbox Cop John</text:p>
          </table:table-cell>
          <table:table-cell/>
          <table:table-cell table:style-name="ce7" office:value-type="date" office:date-value="2026-07-18" calcext:value-type="date">
            <text:p>07/18/26</text:p>
          </table:table-cell>
          <table:table-cell table:number-columns-repeated="4"/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22:31:53.3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5T01:31:21.208000000</meta:creation-date>
    <dc:date>2026-07-18T22:32:15.097000000</dc:date>
    <meta:editing-duration>PT5M29S</meta:editing-duration>
    <meta:editing-cycles>5</meta:editing-cycles>
    <meta:generator>LibreOffice/7.6.6.3$Windows_X86_64 LibreOffice_project/d97b2716a9a4a2ce1391dee1765565ea469b0ae7</meta:generator>
    <meta:document-statistic meta:table-count="1" meta:cell-count="14" meta:object-count="0"/>
  </office:meta>
</office:document-meta>
</file>